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-telegram-bot==20.7</text:p>
      <text:p text:style-name="Standard">flas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13:13:53.833405600</meta:creation-date>
    <dc:date>2026-03-28T13:14:06.347164500</dc:date>
    <meta:editing-duration>PT13S</meta:editing-duration>
    <meta:editing-cycles>1</meta:editing-cycles>
    <meta:document-statistic meta:table-count="0" meta:image-count="0" meta:object-count="0" meta:page-count="1" meta:paragraph-count="2" meta:word-count="2" meta:character-count="30" meta:non-whitespace-character-count="30"/>
    <meta:generator>LibreOffice/25.8.4.1$Windows_X86_64 LibreOffice_project/6ab4ab096601e7cd763971a4dad5a6c7322a1a59</meta:generator>
  </office:meta>
</office:document-meta>
</file>